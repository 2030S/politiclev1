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1E0000019064599380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2cm" svg:height="3.385cm" svg:x="8.74cm" svg:y="6.822cm">
          <draw:image xlink:href="Pictures/100000010000011E000001906459938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6-11T14:59:40.330368700</dc:date>
    <meta:editing-duration>PT1H12M40S</meta:editing-duration>
    <meta:editing-cycles>1</meta:editing-cycles>
    <meta:document-statistic meta:object-count="1"/>
    <meta:generator>LibreOffice/25.8.6.2$Windows_X86_64 LibreOffice_project/b4b39682cd9868fa725bc664aff94278d315bd04</meta:generator>
  </office:meta>
</office:document-meta>
</file>